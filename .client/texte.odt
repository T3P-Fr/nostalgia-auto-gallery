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weight="bold"/>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1cb168"/>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Nostalgia Auto Gallery : Votre partenaire passionné pour l’automobile</text:span></text:h>
      <text:p text:style-name="Text_20_body">Bienvenue chez <text:span text:style-name="T1">Nostalgia Auto Gallery</text:span>.</text:p>
      <text:p text:style-name="Text_20_body">Basé à <text:span text:style-name="T1">Parignargues</text:span>, Nostalgia Auto Gallery est né d'une passion profonde pour l'automobile. Parce qu'une voiture n'est pas seulement un moyen de transport, mais un objet qui mérite attention et soin, j'ai décidé de mettre mon expertise à votre service.</text:p>
      <text:h text:style-name="P1" text:outline-level="4">Notre expertise : de l'entretien à la transaction automobile</text:h>
      <text:p text:style-name="Text_20_body">Chez Nostalgia Auto Gallery, j'accompagne les passionnés et les particuliers à travers une offre complète articulée autour de deux piliers :</text:p>
      <text:p text:style-name="P2">1. Soin et préparation esthétique (Detailing)</text:p>
      <text:list text:style-name="L1">
        <text:list-item>
          <text:p text:style-name="P3"><text:span text:style-name="T1">Nettoyage approfondi :</text:span> Un soin minutieux de l'intérieur et de l'extérieur pour éliminer les traces du quotidien et préserver la valeur de votre véhicule.</text:p>
        </text:list-item>
        <text:list-item>
          <text:p text:style-name="P3"><text:span text:style-name="T1">Préparation esthétique :</text:span> Des techniques adaptées pour redonner de la profondeur à votre peinture et protéger durablement vos surfaces.</text:p>
        </text:list-item>
      </text:list>
      <text:p text:style-name="P2">2. Achat, revente et solutions automobiles</text:p>
      <text:list text:style-name="L2">
        <text:list-item>
          <text:p text:style-name="P4"><text:span text:style-name="T1">Vente de véhicules d'occasion :</text:span> Je sélectionne rigoureusement des véhicules, avec une attention particulière portée à l'état, à l'historique et à la qualité de chaque auto.</text:p>
        </text:list-item>
        <text:list-item>
          <text:p text:style-name="P4"><text:span text:style-name="T1">Pièces détachées :</text:span> Je propose une activité de négoce de véhicules et de pièces automobiles, facilitant ainsi la recherche de solutions pour vos projets mécaniques.</text:p>
        </text:list-item>
      </text:list>
      <text:h text:style-name="P1" text:outline-level="4">Pourquoi nous choisir ?</text:h>
      <text:list text:style-name="L3">
        <text:list-item>
          <text:p text:style-name="P5"><text:span text:style-name="T1">Expertise et rigueur :</text:span> Une approche professionnelle pour garantir des prestations à la hauteur de vos attentes.</text:p>
        </text:list-item>
        <text:list-item>
          <text:p text:style-name="P5"><text:span text:style-name="T1">Passion automobile :</text:span> Je traite chaque véhicule avec un soin extrême, qu'il s'agisse d'une vente ou d'une prestation de detailing.</text:p>
        </text:list-item>
        <text:list-item>
          <text:p text:style-name="P6"><text:span text:style-name="T1">Proximité et mobilité :</text:span> Je vous propose un <text:span text:style-name="T1">service de déplacement à domicile</text:span> ou sur le lieu de votre choix. J'interviens dans tout le département du <text:span text:style-name="T1">Gard (30) ainsi que dans les départements voisins </text:span><text:s/>pour être au plus proche de vos besoins.</text:p>
        </text:list-item>
      </text:list>
      <text:h text:style-name="P1" text:outline-level="4">Un projet auto ? Contactez-nous.</text:h>
      <text:p text:style-name="Text_20_body">Que vous cherchiez votre prochain véhicule, des pièces spécifiques, ou que vous souhaitiez redonner une seconde jeunesse à votre auto, je suis à votre disposition.</text:p>
      <text:p text:style-name="Text_20_body">N'hésitez pas à me contacter par téléphone ou par mail pour toute demande ou devis personnalisé.</text:p>
      <text:p text:style-name="P2">À très vite chez Nostalgia Auto Gallery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6-12T19:45:55.368000000</meta:creation-date>
    <dc:date>2026-06-12T19:50:29.121000000</dc:date>
    <meta:editing-duration>PT4M33S</meta:editing-duration>
    <meta:editing-cycles>1</meta:editing-cycles>
    <meta:document-statistic meta:table-count="0" meta:image-count="0" meta:object-count="0" meta:page-count="1" meta:paragraph-count="19" meta:word-count="334" meta:character-count="2111" meta:non-whitespace-character-count="1802"/>
    <meta:generator>LibreOffice/24.8.4.2$Windows_X86_64 LibreOffice_project/bb3cfa12c7b1bf994ecc5649a80400d06cd71002</meta:generator>
  </office:meta>
</office:document-meta>
</file>